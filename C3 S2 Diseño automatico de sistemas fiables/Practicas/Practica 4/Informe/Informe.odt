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6100000294DAFAFB7F.png" manifest:media-type="image/png"/>
  <manifest:file-entry manifest:full-path="Pictures/100000000000033300000291AD972812.png" manifest:media-type="image/png"/>
  <manifest:file-entry manifest:full-path="Pictures/10000000000003B500000288F0B7C3D6.png" manifest:media-type="image/png"/>
  <manifest:file-entry manifest:full-path="Pictures/10000000000002AD000000E12F7CA549.png" manifest:media-type="image/png"/>
  <manifest:file-entry manifest:full-path="Pictures/10000000000002EE000001A2EB23C9BF.png" manifest:media-type="image/png"/>
  <manifest:file-entry manifest:full-path="Pictures/10000001000000340000000E6E49A3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itle">
      <style:text-properties fo:color="#be480a" loext:opacity="100%" fo:language="es" fo:country="ES" style:language-asian="zxx" style:country-asian="none" style:language-complex="zxx" style:country-complex="none" style:script-type="latin"/>
    </style:style>
    <style:style style:name="P2" style:family="paragraph" style:parent-style-name="Subtitle">
      <style:text-properties fo:language="es" fo:country="ES" style:language-asian="zxx" style:country-asian="none" style:language-complex="zxx" style:country-complex="none" style:script-type="latin"/>
    </style:style>
    <style:style style:name="P3" style:family="paragraph" style:parent-style-name="Text_20_body">
      <style:text-properties fo:language="es" fo:country="ES" style:language-asian="zxx" style:country-asian="none" style:language-complex="zxx" style:country-complex="none" style:script-type="latin"/>
    </style:style>
    <style:style style:name="P4" style:family="paragraph" style:parent-style-name="Text_20_body">
      <style:text-properties fo:language="es" fo:country="ES" officeooo:rsid="000da839" officeooo:paragraph-rsid="000da839" style:language-asian="zxx" style:country-asian="none" style:language-complex="zxx" style:country-complex="none" style:script-type="latin"/>
    </style:style>
    <style:style style:name="P5" style:family="paragraph" style:parent-style-name="Contents_20_Heading">
      <style:paragraph-properties fo:break-before="page"/>
      <style:text-properties fo:language="es" fo:country="ES" style:script-type="latin"/>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paragraph-properties fo:break-before="page"/>
      <style:text-properties fo:language="es" fo:country="ES" officeooo:rsid="000da839" officeooo:paragraph-rsid="000da839" style:language-asian="zxx" style:country-asian="none" style:language-complex="zxx" style:country-complex="none" style:script-type="latin"/>
    </style:style>
    <style:style style:name="P9" style:family="paragraph" style:parent-style-name="Heading">
      <style:paragraph-properties fo:text-align="center" style:justify-single-word="false"/>
      <style:text-properties fo:language="es" fo:country="ES" style:language-asian="zxx" style:country-asian="none" style:language-complex="zxx" style:country-complex="none" style:script-type="latin"/>
    </style:style>
    <style:style style:name="P10" style:family="paragraph" style:parent-style-name="Text_20_body">
      <style:paragraph-properties fo:text-align="justify" style:justify-single-word="false"/>
      <style:text-properties fo:language="es" fo:country="ES" officeooo:paragraph-rsid="000e67e8" style:language-asian="zxx" style:country-asian="none" style:language-complex="zxx" style:country-complex="none" style:script-type="latin"/>
    </style:style>
    <style:style style:name="P11" style:family="paragraph" style:parent-style-name="Text_20_body">
      <style:paragraph-properties fo:text-align="justify" style:justify-single-word="false"/>
      <style:text-properties fo:language="es" fo:country="ES" officeooo:rsid="000e614a" officeooo:paragraph-rsid="000e614a" style:language-asian="zxx" style:country-asian="none" style:language-complex="zxx" style:country-complex="none" style:script-type="latin"/>
    </style:style>
    <style:style style:name="P12" style:family="paragraph" style:parent-style-name="Heading">
      <style:paragraph-properties fo:text-align="center" style:justify-single-word="false"/>
      <style:text-properties fo:language="es" fo:country="ES" officeooo:paragraph-rsid="000e67e8" style:language-asian="zxx" style:country-asian="none" style:language-complex="zxx" style:country-complex="none" style:script-type="latin"/>
    </style:style>
    <style:style style:name="P13" style:family="paragraph" style:parent-style-name="Text_20_body">
      <style:paragraph-properties fo:text-align="justify" style:justify-single-word="false"/>
      <style:text-properties fo:language="es" fo:country="ES" officeooo:rsid="000ef10a" officeooo:paragraph-rsid="000ef10a" style:language-asian="zxx" style:country-asian="none" style:language-complex="zxx" style:country-complex="none" style:script-type="latin"/>
    </style:style>
    <style:style style:name="P14" style:family="paragraph" style:parent-style-name="Text_20_body">
      <style:paragraph-properties fo:text-align="justify" style:justify-single-word="false"/>
      <style:text-properties style:font-name="JetBrains Mono" fo:language="es" fo:country="ES" officeooo:paragraph-rsid="000ef10a" style:language-asian="zxx" style:country-asian="none" style:language-complex="zxx" style:country-complex="none" style:script-type="latin"/>
    </style:style>
    <style:style style:name="P15" style:family="paragraph" style:parent-style-name="Text_20_body">
      <style:text-properties style:font-name="JetBrains Mono" fo:language="es" fo:country="ES" officeooo:paragraph-rsid="000ef10a" style:language-asian="zxx" style:country-asian="none" style:language-complex="zxx" style:country-complex="none" style:script-type="latin"/>
    </style:style>
    <style:style style:name="P16" style:family="paragraph" style:parent-style-name="Text_20_body">
      <style:text-properties fo:language="es" fo:country="ES" officeooo:rsid="000ef10a" officeooo:paragraph-rsid="000ef10a" style:language-asian="zxx" style:country-asian="none" style:language-complex="zxx" style:country-complex="none" style:script-type="latin"/>
    </style:style>
    <style:style style:name="P17" style:family="paragraph" style:parent-style-name="Text_20_body" style:list-style-name="L1">
      <style:text-properties fo:language="es" fo:country="ES" officeooo:rsid="000ef10a" officeooo:paragraph-rsid="000ef10a" style:language-asian="zxx" style:country-asian="none" style:language-complex="zxx" style:country-complex="none" style:script-type="latin"/>
    </style:style>
    <style:style style:name="P18" style:family="paragraph" style:parent-style-name="Heading">
      <style:paragraph-properties fo:text-align="center" style:justify-single-word="false" fo:break-before="page"/>
      <style:text-properties fo:language="es" fo:country="ES" fo:font-weight="bold" style:language-asian="zxx" style:country-asian="none" style:font-weight-asian="bold" style:language-complex="zxx" style:country-complex="none" style:font-weight-complex="bold" style:script-type="latin"/>
    </style:style>
    <style:style style:name="P19" style:family="paragraph" style:parent-style-name="Text_20_body">
      <style:paragraph-properties fo:text-align="justify" style:justify-single-word="false"/>
      <style:text-properties fo:language="es" fo:country="ES" fo:font-weight="normal" officeooo:rsid="000ef10a" officeooo:paragraph-rsid="000ef10a" style:language-asian="zxx" style:country-asian="none" style:font-weight-asian="normal" style:language-complex="zxx" style:country-complex="none" style:font-weight-complex="normal" style:script-type="latin"/>
    </style:style>
    <style:style style:name="P20" style:family="paragraph" style:parent-style-name="Text_20_body">
      <style:paragraph-properties fo:text-align="justify" style:justify-single-word="false"/>
      <style:text-properties fo:language="es" fo:country="ES" fo:font-weight="normal" officeooo:rsid="001b6953" officeooo:paragraph-rsid="001b6953" style:language-asian="zxx" style:country-asian="none" style:font-weight-asian="normal" style:language-complex="zxx" style:country-complex="none" style:font-weight-complex="normal" style:script-type="latin"/>
    </style:style>
    <style:style style:name="P21" style:family="paragraph" style:parent-style-name="Header">
      <style:paragraph-properties fo:text-align="center" style:justify-single-word="false"/>
      <style:text-properties fo:language="es" fo:country="ES" fo:font-weight="bold" officeooo:rsid="000ffbc7" officeooo:paragraph-rsid="000ffbc7" style:language-asian="zxx" style:country-asian="none" style:font-weight-asian="bold" style:language-complex="zxx" style:country-complex="none" style:font-weight-complex="bold" style:script-type="latin"/>
    </style:style>
    <style:style style:name="P22" style:family="paragraph" style:parent-style-name="Text_20_body">
      <style:paragraph-properties style:writing-mode="lr-tb" style:writing-mode-automatic="false"/>
      <style:text-properties fo:language="es" fo:country="ES" fo:font-weight="normal" style:font-weight-asian="normal" style:font-weight-complex="normal" style:script-type="latin"/>
    </style:style>
    <style:style style:name="P23" style:family="paragraph" style:parent-style-name="Text_20_body">
      <style:paragraph-properties style:writing-mode="lr-tb" style:writing-mode-automatic="false"/>
      <style:text-properties fo:language="es" fo:country="ES" fo:font-weight="normal" officeooo:rsid="000ffbc7" officeooo:paragraph-rsid="000ffbc7" style:font-weight-asian="normal" style:font-weight-complex="normal" style:script-type="latin"/>
    </style:style>
    <style:style style:name="P24" style:family="paragraph" style:parent-style-name="Header">
      <style:paragraph-properties fo:text-align="center" style:justify-single-word="false"/>
      <style:text-properties fo:language="es" fo:country="ES" fo:font-weight="bold" officeooo:rsid="000ffbc7" officeooo:paragraph-rsid="0011c28a" style:language-asian="zxx" style:country-asian="none" style:font-weight-asian="bold" style:language-complex="zxx" style:country-complex="none" style:font-weight-complex="bold" style:script-type="latin"/>
    </style:style>
    <style:style style:name="P25" style:family="paragraph" style:parent-style-name="Text_20_body">
      <style:text-properties fo:language="es" fo:country="ES" officeooo:rsid="0011c28a" officeooo:paragraph-rsid="0011c28a" style:script-type="latin"/>
    </style:style>
    <style:style style:name="P26" style:family="paragraph" style:parent-style-name="Text_20_body" style:list-style-name="L2">
      <style:text-properties fo:language="es" fo:country="ES" officeooo:rsid="0011c28a" officeooo:paragraph-rsid="0011c28a" style:script-type="latin"/>
    </style:style>
    <style:style style:name="P27" style:family="paragraph" style:parent-style-name="Text_20_body" style:list-style-name="L2">
      <style:text-properties fo:language="es" fo:country="ES" officeooo:rsid="0012df80" officeooo:paragraph-rsid="0012df80" style:script-type="latin"/>
    </style:style>
    <style:style style:name="P28" style:family="paragraph" style:parent-style-name="Text_20_body">
      <style:text-properties fo:language="es" fo:country="ES" officeooo:rsid="0012df80" officeooo:paragraph-rsid="0012df80" style:script-type="latin"/>
    </style:style>
    <style:style style:name="P29" style:family="paragraph" style:parent-style-name="Figure">
      <style:text-properties officeooo:paragraph-rsid="001413be"/>
    </style:style>
    <style:style style:name="P30" style:family="paragraph" style:parent-style-name="Caption">
      <style:text-properties fo:language="es" fo:country="ES" officeooo:rsid="0015b976" officeooo:paragraph-rsid="0015b976" style:script-type="latin"/>
    </style:style>
    <style:style style:name="P31" style:family="paragraph" style:parent-style-name="Heading">
      <style:paragraph-properties fo:text-align="center" style:justify-single-word="false"/>
      <style:text-properties fo:language="es" fo:country="ES" fo:font-weight="bold" officeooo:paragraph-rsid="0015b976" style:language-asian="zxx" style:country-asian="none" style:font-weight-asian="bold" style:language-complex="zxx" style:country-complex="none" style:font-weight-complex="bold" style:script-type="latin"/>
    </style:style>
    <style:style style:name="P32" style:family="paragraph" style:parent-style-name="Text_20_body">
      <style:text-properties fo:language="es" fo:country="ES" style:script-type="latin"/>
    </style:style>
    <style:style style:name="P33" style:family="paragraph" style:parent-style-name="Text_20_body">
      <style:text-properties fo:language="es" fo:country="ES" officeooo:rsid="0015b976" officeooo:paragraph-rsid="0015b976" style:script-type="latin"/>
    </style:style>
    <style:style style:name="P34" style:family="paragraph" style:parent-style-name="Header">
      <style:paragraph-properties fo:text-align="center" style:justify-single-word="false"/>
      <style:text-properties fo:language="es" fo:country="ES" fo:font-weight="bold" officeooo:rsid="0015b976" officeooo:paragraph-rsid="0015b976" style:language-asian="zxx" style:country-asian="none" style:font-weight-asian="bold" style:language-complex="zxx" style:country-complex="none" style:font-weight-complex="bold" style:script-type="latin"/>
    </style:style>
    <style:style style:name="P35" style:family="paragraph" style:parent-style-name="Text_20_body">
      <style:text-properties fo:language="es" fo:country="ES" officeooo:rsid="0015b976" officeooo:paragraph-rsid="001606f4" style:script-type="latin"/>
    </style:style>
    <style:style style:name="P36" style:family="paragraph" style:parent-style-name="Text_20_body">
      <style:text-properties fo:language="es" fo:country="ES" officeooo:rsid="001606f4" officeooo:paragraph-rsid="001606f4" style:script-type="latin"/>
    </style:style>
    <style:style style:name="P37" style:family="paragraph" style:parent-style-name="Text_20_body">
      <style:paragraph-properties fo:text-align="center" style:justify-single-word="false"/>
      <style:text-properties fo:language="es" fo:country="ES" fo:font-weight="bold" officeooo:paragraph-rsid="0015b976" style:language-asian="zxx" style:country-asian="none" style:font-weight-asian="bold" style:language-complex="zxx" style:country-complex="none" style:font-weight-complex="bold" style:script-type="latin"/>
    </style:style>
    <style:style style:name="P38" style:family="paragraph" style:parent-style-name="Header">
      <style:paragraph-properties fo:text-align="center" style:justify-single-word="false"/>
      <style:text-properties fo:language="es" fo:country="ES" fo:font-weight="bold" officeooo:rsid="0015b976" officeooo:paragraph-rsid="0016df45" style:language-asian="zxx" style:country-asian="none" style:font-weight-asian="bold" style:language-complex="zxx" style:country-complex="none" style:font-weight-complex="bold" style:script-type="latin"/>
    </style:style>
    <style:style style:name="P39" style:family="paragraph" style:parent-style-name="Text_20_body">
      <style:text-properties fo:language="es" fo:country="ES" officeooo:rsid="0016df45" officeooo:paragraph-rsid="0016df45" style:script-type="latin"/>
    </style:style>
    <style:style style:name="P40" style:family="paragraph" style:parent-style-name="Header">
      <style:paragraph-properties fo:text-align="center" style:justify-single-word="false"/>
      <style:text-properties fo:language="es" fo:country="ES" fo:font-weight="bold" officeooo:rsid="0015b976" officeooo:paragraph-rsid="00172798" style:language-asian="zxx" style:country-asian="none" style:font-weight-asian="bold" style:language-complex="zxx" style:country-complex="none" style:font-weight-complex="bold" style:script-type="latin"/>
    </style:style>
    <style:style style:name="P41" style:family="paragraph" style:parent-style-name="Text_20_body">
      <style:text-properties fo:language="es" fo:country="ES" officeooo:rsid="00172798" officeooo:paragraph-rsid="00172798" style:script-type="latin"/>
    </style:style>
    <style:style style:name="P42" style:family="paragraph" style:parent-style-name="Text_20_body">
      <style:paragraph-properties style:writing-mode="lr-tb" style:writing-mode-automatic="false"/>
      <style:text-properties fo:language="es" fo:country="ES" officeooo:rsid="00172798" officeooo:paragraph-rsid="00172798" style:script-type="latin"/>
    </style:style>
    <style:style style:name="P43" style:family="paragraph" style:parent-style-name="Heading">
      <style:paragraph-properties fo:text-align="center" style:justify-single-word="false"/>
      <style:text-properties fo:language="es" fo:country="ES" fo:font-weight="bold" officeooo:paragraph-rsid="00172798" style:language-asian="zxx" style:country-asian="none" style:font-weight-asian="bold" style:language-complex="zxx" style:country-complex="none" style:font-weight-complex="bold" style:script-type="latin"/>
    </style:style>
    <style:style style:name="P44"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language="es" fo:country="ES" style:script-type="latin"/>
    </style:style>
    <style:style style:name="P45"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fo:language="es" fo:country="ES" style:script-type="latin"/>
    </style:style>
    <style:style style:name="P46"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style>
    <style:style style:name="T1" style:family="text">
      <style:text-properties officeooo:rsid="000da839"/>
    </style:style>
    <style:style style:name="T2" style:family="text">
      <style:text-properties fo:language="es" fo:country="ES" style:script-type="latin"/>
    </style:style>
    <style:style style:name="T3" style:family="text">
      <style:text-properties fo:font-weight="bold" officeooo:rsid="000e614a" style:font-weight-asian="bold" style:font-weight-complex="bold"/>
    </style:style>
    <style:style style:name="T4" style:family="text">
      <style:text-properties officeooo:rsid="000e614a"/>
    </style:style>
    <style:style style:name="T5" style:family="text">
      <style:text-properties officeooo:rsid="000e67e8"/>
    </style:style>
    <style:style style:name="T6" style:family="text">
      <style:text-properties style:font-name="JetBrains Mono" fo:font-size="11pt" officeooo:rsid="000e67e8" style:font-size-asian="11pt" style:font-size-complex="11pt"/>
    </style:style>
    <style:style style:name="T7" style:family="text">
      <style:text-properties style:font-name="JetBrains Mono" officeooo:rsid="000e67e8"/>
    </style:style>
    <style:style style:name="T8" style:family="text">
      <style:text-properties fo:font-weight="bold" officeooo:rsid="000e67e8" style:font-weight-asian="bold" style:font-weight-complex="bold"/>
    </style:style>
    <style:style style:name="T9" style:family="text">
      <style:text-properties fo:font-weight="bold" style:font-weight-asian="bold" style:font-weight-complex="bold"/>
    </style:style>
    <style:style style:name="T10" style:family="text">
      <style:text-properties officeooo:rsid="000ffbc7"/>
    </style:style>
    <style:style style:name="T11" style:family="text">
      <style:text-properties officeooo:rsid="0011c28a"/>
    </style:style>
    <style:style style:name="T12" style:family="text">
      <style:text-properties officeooo:rsid="001413be"/>
    </style:style>
    <style:style style:name="T13" style:family="text">
      <style:text-properties style:text-underline-style="none" officeooo:rsid="001413be"/>
    </style:style>
    <style:style style:name="T14" style:family="text">
      <style:text-properties officeooo:rsid="0015b976"/>
    </style:style>
    <style:style style:name="T15" style:family="text">
      <style:text-properties officeooo:rsid="001606f4"/>
    </style:style>
    <style:style style:name="T16" style:family="text">
      <style:text-properties officeooo:rsid="00172798"/>
    </style:style>
    <style:style style:name="T17" style:family="text">
      <style:text-properties officeooo:rsid="0019146c"/>
    </style:style>
    <style:style style:name="T18" style:family="text">
      <style:text-properties officeooo:rsid="0016df45"/>
    </style:style>
    <style:style style:name="T19" style:family="text">
      <style:text-properties officeooo:rsid="001acded"/>
    </style:style>
    <style:style style:name="T20" style:family="text">
      <style:text-properties fo:font-weight="normal" style:font-weight-asian="normal" style:font-weight-complex="normal"/>
    </style:style>
    <style:style style:name="T21" style:family="text">
      <style:text-properties style:font-name="Google Sans Text" fo:language="es" fo:country="ES" fo:font-weight="normal" style:font-weight-asian="normal" style:font-weight-complex="normal" style:script-type="latin"/>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1098_716519090"/>Práctica 4:<text:line-break/><text:span text:style-name="T1">Filtro</text:span> SMA de orden 4<text:bookmark-end text:name="__RefHeading___Toc1098_716519090"/></text:p>
      <text:p text:style-name="P2">Diseño automático de sistemas fiables</text:p>
      <text:p text:style-name="P2">Victor Arroyo Márquez</text:p>
      <text:p text:style-name="P2">Jose Fernando Marcilla Morán </text:p>
      <text:p text:style-name="P2">Marcelo Fort Muñoz</text:p>
      <text:p text:style-name="P2">{mfortm,varroyom,jmarcillam1}@alumnos.nebrija.es</text:p>
      <text:p text:style-name="P3"><text:tab/></text:p>
      <text:p text:style-name="P4"/>
      <text:table-of-content text:style-name="Sect1" text:name="Table of Contents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Title"/>
          </text:index-source-styles>
          <text:index-source-styles text:outline-level="2">
            <text:index-source-style text:style-name="Header"/>
          </text:index-source-styles>
        </text:table-of-content-source>
        <text:index-body>
          <text:index-title text:style-name="Sect1" text:name="Table of Contents1_Head">
            <text:p text:style-name="P5">Índice</text:p>
          </text:index-title>
          <text:p text:style-name="P6"><text:a xlink:type="simple" xlink:href="#__RefHeading___Toc1098_716519090" office:name="Práctica 4: Filtro SMA de orden 4" text:style-name="Index_20_Link" text:visited-style-name="Index_20_Link"><text:span text:style-name="T2">Práctica 4: Filtro SMA de orden 4<text:tab/>1</text:span></text:a></text:p>
          <text:p text:style-name="P6"><text:a xlink:type="simple" xlink:href="#__RefHeading___Toc30_716519090" office:name="1. Introducción y objetivos" text:style-name="Index_20_Link" text:visited-style-name="Index_20_Link"><text:span text:style-name="T2">1. Introducción y objetivos<text:tab/>3</text:span></text:a></text:p>
          <text:p text:style-name="P6"><text:a xlink:type="simple" xlink:href="#__RefHeading___Toc30_716519090%20Copy%201" office:name="2. Descripción del diseño" text:style-name="Index_20_Link" text:visited-style-name="Index_20_Link"><text:span text:style-name="T2">2. Descripción del diseño<text:tab/>3</text:span></text:a></text:p>
          <text:p text:style-name="P6"><text:a xlink:type="simple" xlink:href="#__RefHeading___Toc224_716519090" office:name="3. Verificación" text:style-name="Index_20_Link" text:visited-style-name="Index_20_Link"><text:span text:style-name="T2">3. Verificación<text:tab/>4</text:span></text:a></text:p>
          <text:p text:style-name="P7"><text:a xlink:type="simple" xlink:href="#__RefHeading___Toc218_716519090" office:name="A. Triangular y reset inicial." text:style-name="Index_20_Link" text:visited-style-name="Index_20_Link"><text:span text:style-name="T2">A. Triangular y reset inicial.<text:tab/>4</text:span></text:a></text:p>
          <text:p text:style-name="P7"><text:a xlink:type="simple" xlink:href="#__RefHeading___Toc216_716519090" office:name="B. Cuadrada" text:style-name="Index_20_Link" text:visited-style-name="Index_20_Link"><text:span text:style-name="T2">B. Cuadrada<text:tab/>4</text:span></text:a></text:p>
          <text:p text:style-name="P7"><text:a xlink:type="simple" xlink:href="#__RefHeading___Toc214_716519090" office:name="C. Dientes de sierra" text:style-name="Index_20_Link" text:visited-style-name="Index_20_Link"><text:span text:style-name="T2">C. Dientes de sierra<text:tab/>4</text:span></text:a></text:p>
          <text:p text:style-name="P7"><text:a xlink:type="simple" xlink:href="#__RefHeading___Toc212_716519090" office:name="D. Comprobaciones automáticas por código" text:style-name="Index_20_Link" text:visited-style-name="Index_20_Link"><text:span text:style-name="T2">D. Comprobaciones automáticas por código<text:tab/>4</text:span></text:a></text:p>
          <text:p text:style-name="P6"><text:a xlink:type="simple" xlink:href="#__RefHeading___Toc222_716519090" office:name="4. Análisis de resultados" text:style-name="Index_20_Link" text:visited-style-name="Index_20_Link"><text:span text:style-name="T2">4. Análisis de resultados<text:tab/>5</text:span></text:a></text:p>
          <text:p text:style-name="P7"><text:a xlink:type="simple" xlink:href="#__RefHeading___Toc210_716519090" office:name="A. Sobre la suavidad de la entrada" text:style-name="Index_20_Link" text:visited-style-name="Index_20_Link"><text:span text:style-name="T2">A. Sobre la suavidad de la entrada<text:tab/>6</text:span></text:a></text:p>
          <text:p text:style-name="P7"><text:a xlink:type="simple" xlink:href="#__RefHeading___Toc208_716519090" office:name=" B. Sobre el retardo respecto a la señal original" text:style-name="Index_20_Link" text:visited-style-name="Index_20_Link"><text:span text:style-name="T2"><text:s/>B. Sobre el retardo respecto a la señal original<text:tab/>7</text:span></text:a></text:p>
          <text:p text:style-name="P7"><text:a xlink:type="simple" xlink:href="#__RefHeading___Toc206_716519090" office:name="C. Sobre la respuesta de la máquina al cambio repentino de la entrada" text:style-name="Index_20_Link" text:visited-style-name="Index_20_Link"><text:span text:style-name="T2">C. Sobre la respuesta de la máquina al cambio repentino de la entrada<text:tab/>7</text:span></text:a></text:p>
          <text:p text:style-name="P7"><text:a xlink:type="simple" xlink:href="#__RefHeading___Toc204_716519090" office:name="D. Qué señal muestra más claramente el filtrado." text:style-name="Index_20_Link" text:visited-style-name="Index_20_Link"><text:span text:style-name="T2">D. Qué señal muestra más claramente el filtrado.<text:tab/>8</text:span></text:a></text:p>
          <text:p text:style-name="P6"><text:a xlink:type="simple" xlink:href="#__RefHeading___Toc220_716519090" office:name="5. Conclusiones" text:style-name="Index_20_Link" text:visited-style-name="Index_20_Link"><text:span text:style-name="T2">5. Conclusiones<text:tab/>8</text:span></text:a></text:p>
        </text:index-body>
      </text:table-of-content>
      <text:p text:style-name="P4"/>
      <text:p text:style-name="P8"></text:p>
      <text:p text:style-name="P9"><text:bookmark-start text:name="__RefHeading___Toc30_716519090"/><text:span text:style-name="T3">1.</text:span><text:span text:style-name="T4"> Introducción y objetivos</text:span><text:bookmark-end text:name="__RefHeading___Toc30_716519090"/></text:p>
      <text:p text:style-name="P10"><text:span text:style-name="T4">Cuando se obtienen muchos datos de un sensor físico, a veces hay datos erróneos o variaciones muy bruscas que pueden debilitar la calidad de la información adquirida. Para esto, se puede hacer medias de los datos. Sin embargo, con hacer la media no es suficiente. Por eso, hacemos la media móvil, qué va «cogiendo» los datos según van entrando y, devuelve las media entre los N últimos números, suavizando la salida.</text:span></text:p>
      <text:p text:style-name="P10"><text:span text:style-name="T5">En este caso, con </text:span><draw:frame draw:style-name="fr1" draw:name="Image1" text:anchor-type="char" svg:x="3.182cm" svg:y="0.173cm" svg:width="1.376cm" svg:height="0.37cm" draw:z-index="0"><draw:image xlink:href="Pictures/10000001000000340000000E6E49A36E.png" xlink:type="simple" xlink:show="embed" xlink:actuate="onLoad" draw:mime-type="image/png"/></draw:frame><text:span text:style-name="T5"><text:s text:c="2"/>, el filtro sólo carga nuevos datos cuando </text:span><text:span text:style-name="T6">load=’1’</text:span><text:span text:style-name="T7">.</text:span><text:span text:style-name="T4"> </text:span><text:span text:style-name="T5">Además, para dividir entre 4 se realiza un desplazamiento de dos bits a la derecha, ahorrando recursos de la FPGA destino.</text:span></text:p>
      <text:p text:style-name="P11">En nuestro caso, nuestra máquina es síncrona (es decir, funciona en base a un reloj) y, de orden 4 (es decir, funciona con cuatro muestras para la media). Los datos son de 8 bits sin signo.</text:p>
      <text:p text:style-name="P11"/>
      <text:p text:style-name="P12"><text:bookmark-start text:name="__RefHeading___Toc30_716519090 Copy 1"/><text:span text:style-name="T8">2</text:span><text:span text:style-name="T9">.</text:span> <text:span text:style-name="T5">Descripción del diseño</text:span><text:bookmark-end text:name="__RefHeading___Toc30_716519090 Copy 1"/></text:p>
      <text:p text:style-name="P13">Se ha diseñado un componente que, como especificado en el enunciado, cumple con la siguiente interfaz:</text:p>
      <text:p text:style-name="P14">entity sma_filter is</text:p>
      <text:p text:style-name="P14"><text:tab/>Port ( clk : in STD_LOGIC;</text:p>
      <text:p text:style-name="P14"><text:tab/><text:tab/>rst : in STD_LOGIC; </text:p>
      <text:p text:style-name="P15"><text:tab/><text:tab/>din : in STD_LOGIC_VECTOR (7 downto 0); </text:p>
      <text:p text:style-name="P15"><text:tab/><text:tab/>load : in STD_LOGIC; </text:p>
      <text:p text:style-name="P15"><text:tab/><text:tab/>dout : out STD_LOGIC_VECTOR (7 downto 0));</text:p>
      <text:p text:style-name="P15">end sma_filter;</text:p>
      <text:p text:style-name="P16">Esta tiene:</text:p>
      <text:list text:style-name="L1">
        <text:list-item>
          <text:p text:style-name="P17">Un reloj.</text:p>
        </text:list-item>
        <text:list-item>
          <text:p text:style-name="P17">Una entrada de 8 bits.</text:p>
        </text:list-item>
        <text:list-item>
          <text:p text:style-name="P17">Un bit selector de carga, una especie de «load enable» .</text:p>
        </text:list-item>
        <text:list-item>
          <text:p text:style-name="P17">Una salida de 8 bits.</text:p>
        </text:list-item>
        <text:list-item>
          <text:p text:style-name="P17">4 registros internos de 8 bits en los que se almacenan las entradas para hacer la media móvil.</text:p>
        </text:list-item>
      </text:list>
      <text:p text:style-name="P16">Cuando load está activada, se van sumando los registros cada ciclo y se hace un desplazamiento, haciendo una división efectiva entre 4.</text:p>
      <text:p text:style-name="P16"/>
      <text:p text:style-name="P18"><text:bookmark-start text:name="__RefHeading___Toc224_716519090"/>3. Verificación<text:bookmark-end text:name="__RefHeading___Toc224_716519090"/></text:p>
      <text:p text:style-name="P19">Siendo esta práctica un recorrido por todo el proceso de diseño y verificación, no se podría justificar la ausencia de esta sección. Para comprobar que el código funcionaba correctamente, hemos probado con múltiples estímulos.</text:p>
      <text:p text:style-name="P20">A continuación detallamos lo implementado en la verificación.</text:p>
      <text:p text:style-name="P21"><text:bookmark-start text:name="__RefHeading___Toc218_716519090"/>A. Triangular y reset inicial.<text:bookmark-end text:name="__RefHeading___Toc218_716519090"/></text:p>
      <text:p text:style-name="P22"><text:span text:style-name="T10">Primero, reseteamos el sistema para evitar valores indeterminados o incorrectos en la máquina. Esto lo hacemos poniendo a valor alto el puerto de reset, esperando un ciclo y, posteriormente, poniéndolo de nuevo a valor bajo.</text:span></text:p>
      <text:p text:style-name="P23">Luego, introducimos unas entradas que simulan la forma de triángulo, es decir, incrementan con un factor estable para luego descender con ese mismo factor, haciendo la forma de triángulo con dos «rampas», una de «subida» y otra de «bajada». <text:span text:style-name="T11">Estos estímulos nos permiten ver como la máquina responde a una serie de estímulos más normales y predecibles.</text:span></text:p>
      <text:p text:style-name="P23"/>
      <text:p text:style-name="P24"><text:bookmark-start text:name="__RefHeading___Toc216_716519090"/><text:span text:style-name="T11">B</text:span>. <text:span text:style-name="T11">Cuadrada</text:span><text:bookmark-end text:name="__RefHeading___Toc216_716519090"/></text:p>
      <text:p text:style-name="P24"/>
      <text:p text:style-name="P25">A continuación, se implementó una serie de estímulos que cumplían el siguiente patrón: mantienen el valor mínimo, saltan al máximo y se mantienen en el durante un par de ciclos para a continuación volver al mínimo. Estos estímulos nos permiten ver como nuestro diseño responde ante un caso de variabilidad extrema.</text:p>
      <text:p text:style-name="P24"><text:bookmark-start text:name="__RefHeading___Toc214_716519090"/><text:span text:style-name="T11">C</text:span>. <text:span text:style-name="T11">Dientes de sierra</text:span><text:bookmark-end text:name="__RefHeading___Toc214_716519090"/></text:p>
      <text:p text:style-name="P24"/>
      <text:p text:style-name="P25">Finalmente, probamos con un patrón de dientes de sierra. Este se caracteriza por ser asimétrico y con cambios repetitivos. Permite ver muy bien cómo responde el autómata ante una entrada con una especie de desvío o entrada anómala.</text:p>
      <text:p text:style-name="P24"><text:bookmark-start text:name="__RefHeading___Toc212_716519090"/><text:span text:style-name="T11">D</text:span>. <text:span text:style-name="T11">Comprobaciones automáticas por código</text:span><text:bookmark-end text:name="__RefHeading___Toc212_716519090"/></text:p>
      <text:p text:style-name="P24"/>
      <text:p text:style-name="P25">Hemos automatizado ciertas pruebas usando la suite que VHDL nos proporciona.</text:p>
      <text:p text:style-name="P25">En nuestro caso, hemos comprobado:</text:p>
      <text:list text:style-name="L2">
        <text:list-item>
          <text:p text:style-name="P26">Que tras la entrada cuatro veces del valor máximo, la salida se corresponde con este (línea 150).</text:p>
        </text:list-item>
        <text:list-item>
          <text:p text:style-name="P26">Que tras la activación del bit de reset la salida se ponga a 0 (línea 213).</text:p>
        </text:list-item>
        <text:list-item>
          <text:p text:style-name="P27">Que después del reset el sistema funciona correctamente (línea 228)</text:p>
        </text:list-item>
        <text:list-item>
          <text:p text:style-name="P27">Que después de desactivar el bit de habilitar carga (load), el sistema se «congela», es decir, mantiene su estado y no recoge los datos de la entrada.</text:p>
        </text:list-item>
      </text:list>
      <text:p text:style-name="P28"><draw:frame draw:style-name="fr2" draw:name="Frame1" text:anchor-type="char" svg:width="17cm" draw:z-index="1"><draw:text-box fo:min-height="9.474cm"><text:p text:style-name="P29"><draw:frame draw:style-name="fr3" draw:name="Image4" text:anchor-type="paragraph" svg:width="17cm" style:rel-width="100%" svg:height="9.474cm" style:rel-height="scale" draw:z-index="2"><draw:image xlink:href="Pictures/10000000000002EE000001A2EB23C9BF.png" xlink:type="simple" xlink:show="embed" xlink:actuate="onLoad" draw:mime-type="image/png"/></draw:frame>Figure <text:sequence text:ref-name="refFigure0" text:name="Figure" text:formula="ooow:Figure+1" style:num-format="1">1</text:sequence>: Ejecución de la simulación con estímulos descritos en las secciones 3.<text:span text:style-name="T12">A</text:span>, 3.<text:span text:style-name="T12">B</text:span> y 3.<text:span text:style-name="T12">C</text:span> </text:p></draw:text-box></draw:frame><text:soft-page-break/></text:p>
      <text:p text:style-name="P30">Nótese que no se muestran los contenidos de s_dout. Esto es intencionado, ya que se estudiarán en la sección venidera y penúltima a este informe de laboratorio.</text:p>
      <text:p text:style-name="P24"/>
      <text:p text:style-name="P24"><draw:frame draw:style-name="fr2" draw:name="Frame2" text:anchor-type="char" svg:width="17cm" draw:z-index="3"><draw:text-box fo:min-height="5.583cm"><text:p text:style-name="Figure"><draw:frame draw:style-name="fr3" draw:name="Image5" text:anchor-type="paragraph" svg:width="17cm" style:rel-width="100%" svg:height="5.583cm" style:rel-height="scale" draw:z-index="4"><draw:image xlink:href="Pictures/10000000000002AD000000E12F7CA549.png" xlink:type="simple" xlink:show="embed" xlink:actuate="onLoad" draw:mime-type="image/png"/></draw:frame>Figure <text:sequence text:ref-name="refFigure1" text:name="Figure" text:formula="ooow:Figure+1" style:num-format="1">2</text:sequence>: Log después de una simulación acorde a lo escrito en el apartado 3.<text:span text:style-name="T13">D</text:span></text:p></draw:text-box></draw:frame></text:p>
      <text:p text:style-name="P24"/>
      <text:p text:style-name="P24"/>
      <text:p text:style-name="P31"><text:bookmark-start text:name="__RefHeading___Toc222_716519090"/><text:span text:style-name="T14">4. Análisis de resultados</text:span><text:bookmark-end text:name="__RefHeading___Toc222_716519090"/></text:p>
      <text:p text:style-name="P32">Procedemos <text:span text:style-name="T14">ahora a la fase de análisis de resultados. Igual que en la anterior, justificaremos esta implementación que hemos realizado con datos comprobables y reales.</text:span></text:p>
      <text:p text:style-name="P33">Con permiso del enunciado y justificando la escasez de este apartado, nos permitiremos la licencia de contestar solamente a las preguntas que han sido formuladas en las guías de la práctica.</text:p>
      <text:p text:style-name="P34"><text:bookmark-start text:name="__RefHeading___Toc210_716519090"/><text:soft-page-break/>A. Sobre la suavidad de la entrada<text:bookmark-end text:name="__RefHeading___Toc210_716519090"/></text:p>
      <text:p text:style-name="P35">Se pregunta en el enunciado si nuestra salida es más suave que la entrada. Nuestra respuesta a esta pregunta es sí, más <text:span text:style-name="T15">es una suavidad algo difícil de apreciar al ser el orden 4.</text:span></text:p>
      <text:p text:style-name="P36">En la <text:sequence-ref text:reference-format="category-and-value" text:ref-name="refFigure4">Figure 3</text:sequence-ref><text:s/>podemos ver cómo en el caso de la entrada triangular, con un retardo, los valores que van saliendo con la media móvil crecen de una forma más equilibrada que la entrada. En la <text:sequence-ref text:reference-format="category-and-value" text:ref-name="refFigure2">Figure 4</text:sequence-ref><text:s/>vemos como en lugar de saltar a 255 directamente cómo en la entrada, pasa por 6<text:span text:style-name="T16">3</text:span>, 127 y 191 antes, suavizando esa entrada. Posteriormente, repite ese patrón a la inversa, suavizando también la bajada al contrario que la entrada, que salta a 0. Finalmente, en el caso de la sierra, vemos en la <text:sequence-ref text:reference-format="category-and-value" text:ref-name="refFigure3">Figure 5</text:sequence-ref><text:s/>como también se suaviza la entrada respecto a la entrada original.</text:p>
      <text:p text:style-name="P33"/>
      <text:p text:style-name="P33"><draw:frame draw:style-name="fr2" draw:name="Frame5" text:anchor-type="char" svg:width="14.369cm" draw:z-index="9"><draw:text-box fo:min-height="9.403cm"><text:p text:style-name="Figure"><draw:frame draw:style-name="fr3" draw:name="Image9" text:anchor-type="paragraph" svg:width="14.369cm" style:rel-width="100%" svg:height="9.811cm" style:rel-height="scale" draw:z-index="10"><draw:image xlink:href="Pictures/10000000000003B500000288F0B7C3D6.png" xlink:type="simple" xlink:show="embed" xlink:actuate="onLoad" draw:mime-type="image/png"/></draw:frame>Figure <text:sequence text:ref-name="refFigure4" text:name="Figure" text:formula="ooow:Figure+1" style:num-format="1">3</text:sequence>: Comparación de salidas de triangular: entrada vs salida</text:p></draw:text-box></draw:frame></text:p>
      <text:p text:style-name="P33"/>
      <text:p text:style-name="P33"/>
      <text:p text:style-name="P33"><draw:frame draw:style-name="fr2" draw:name="Frame3" text:anchor-type="char" svg:width="11.111cm" draw:z-index="5"><draw:text-box fo:min-height="10.026cm"><text:p text:style-name="Figure"><draw:frame draw:style-name="fr4" draw:name="Image7" text:anchor-type="paragraph" svg:x="0cm" svg:y="-0.709cm" svg:width="11.111cm" style:rel-width="100%" svg:height="8.911cm" style:rel-height="scale" draw:z-index="6"><draw:image xlink:href="Pictures/100000000000033300000291AD972812.png" xlink:type="simple" xlink:show="embed" xlink:actuate="onLoad" draw:mime-type="image/png"/></draw:frame>Figure <text:sequence text:ref-name="refFigure2" text:name="Figure" text:formula="ooow:Figure+1" style:num-format="1">4</text:sequence>: Comparación de salidas de <text:span text:style-name="T15">cuadrada</text:span>: entrada vs salida</text:p></draw:text-box></draw:frame></text:p>
      <text:p text:style-name="P33"/>
      <text:p text:style-name="P33"/>
      <text:p text:style-name="P33"/>
      <text:p text:style-name="P33"/>
      <text:p text:style-name="P33"/>
      <text:p text:style-name="P33"/>
      <text:p text:style-name="P33"><text:soft-page-break/></text:p>
      <text:p text:style-name="P33"/>
      <text:p text:style-name="P33"/>
      <text:p text:style-name="P33"/>
      <text:p text:style-name="P33"><draw:frame draw:style-name="fr2" draw:name="Frame4" text:anchor-type="char" svg:width="17cm" draw:z-index="7"><draw:text-box fo:min-height="10.008cm"><text:p text:style-name="Figure"><draw:frame draw:style-name="fr5" draw:name="Image8" text:anchor-type="char" svg:width="17cm" style:rel-width="100%" svg:height="10.008cm" style:rel-height="scale" draw:z-index="8"><draw:image xlink:href="Pictures/100000000000046100000294DAFAFB7F.png" xlink:type="simple" xlink:show="embed" xlink:actuate="onLoad" draw:mime-type="image/png"/></draw:frame>Figure <text:sequence text:ref-name="refFigure3" text:name="Figure" text:formula="ooow:Figure+1" style:num-format="1">5</text:sequence>: Comparación de salidas de <text:span text:style-name="T15">sierra</text:span>: entrada vs salida</text:p></draw:text-box></draw:frame></text:p>
      <text:p text:style-name="P37"/>
      <text:p text:style-name="P38"><text:bookmark-start text:name="__RefHeading___Toc208_716519090"/><text:s/><text:span text:style-name="T17">B</text:span><text:span text:style-name="T18">. Sobre el retardo respecto a la señal original</text:span><text:bookmark-end text:name="__RefHeading___Toc208_716519090"/></text:p>
      <text:p text:style-name="P39">Efectivamente, sí existe este retardo. Esto se debe a que la entrada depende de las cuatro muestras para actualizarse y, por ello, tiene una cierta latencia. Este efecto se ve con claridad en las figuras <text:sequence-ref text:reference-format="category-and-value" text:ref-name="refFigure4">Figure 3</text:sequence-ref>, <text:sequence-ref text:reference-format="category-and-value" text:ref-name="refFigure2">Figure 4</text:sequence-ref><text:s/>y <text:sequence-ref text:reference-format="category-and-value" text:ref-name="refFigure3">Figure 5</text:sequence-ref>.</text:p>
      <text:p text:style-name="P39"/>
      <text:p text:style-name="P40"><text:bookmark-start text:name="__RefHeading___Toc206_716519090"/><text:span text:style-name="T17">C</text:span><text:span text:style-name="T16">.</text:span><text:span text:style-name="T18"> Sobre </text:span><text:span text:style-name="T16">la respuesta de la máquina al cambio repentino de la entrada</text:span><text:bookmark-end text:name="__RefHeading___Toc206_716519090"/></text:p>
      <text:p text:style-name="P41">Cuando se recibe una entrada con un salto instantáneo, la salida va adquiriendo ese cambio de forma amortiguada por la media móvil. Al ser el filtro de cuarto orden, este requiere de que los nuevos valores vayan llenando su memoria con los nuevos valores, escalonando esa transición progresiva. Por ejemplo, al cambiar de 0 a 255, la salida va tomando los valores 63, 127 y 191 antes de llegar a una convergencia final al valor máximo (que dicho de otra forma, es 255). Este comportamiento es el que se espera con un SMA. Sin cambios súbitos, siempre aumento<text:span text:style-name="T19">s</text:span> escalonados.</text:p>
      <text:p text:style-name="P41"/>
      <text:p text:style-name="P40"><text:bookmark-start text:name="__RefHeading___Toc204_716519090"/><text:soft-page-break/><text:span text:style-name="T17">D</text:span><text:span text:style-name="T16">.</text:span><text:span text:style-name="T18"> </text:span><text:span text:style-name="T16">Qué señal muestra más claramente el filtrado.</text:span><text:bookmark-end text:name="__RefHeading___Toc204_716519090"/></text:p>
      <text:p text:style-name="P42">Claramente, cómo se observa en la <text:sequence-ref text:reference-format="category-and-value" text:ref-name="refFigure2">Figure 4</text:sequence-ref>, el patrón «favorito» para ver el filtrado es el cuadrado. Esto se debe a que debido al gran salto se puede ver el escalado de la media móvil contra el cambio brusco que se dá en la entrada. Las transiciones son suaves en comparación y hay un retardo que justifica el apartado anterior.</text:p>
      <text:p text:style-name="P42"/>
      <text:p text:style-name="P43"><text:bookmark-start text:name="__RefHeading___Toc220_716519090"/><text:span text:style-name="T17">5</text:span><text:span text:style-name="T16">. Conclusiones</text:span><text:bookmark-end text:name="__RefHeading___Toc220_716519090"/></text:p>
      <text:p text:style-name="P44">Tras el desarrollo y verificación del filtro SMA de orden 4, podemos extraer las siguientes conclusiones:</text:p>
      <text:list text:style-name="L3">
        <text:list-item>
          <text:p text:style-name="P45"><text:bookmark text:name="p-rc_f00ee8762033e9f3-587"/><text:span text:style-name="T20">Cumplimiento de Objetivos</text:span><text:span text:style-name="T20">: Se ha implementado con éxito un módulo VHDL sintetizable capaz de procesar señales de 8 bits mediante una ventana deslizante.</text:span> El diseño respeta íntegramente la arquitectura síncrona.</text:p>
        </text:list-item>
        <text:list-item>
          <text:p text:style-name="P45"><text:bookmark text:name="p-rc_f00ee8762033e9f3-589"/><text:span text:style-name="T20">Validación del Filtrado</text:span><text:span text:style-name="T20">: Mediante la simulación de señales triangulares, cuadradas y de sierra, se ha validado cualitativamente el efecto de suavizado y amortiguación de transiciones bruscas.</text:span> La respuesta del filtro ante la señal cuadrada ilustra con claridad el retardo de 4 muestras que introduce el procesado.</text:p>
        </text:list-item>
        <text:list-item>
          <text:p text:style-name="P46"><text:bookmark text:name="p-rc_f00ee8762033e9f3-590"/><text:span text:style-name="T21">Robustez de Verificación: El uso de un testbench exhaustivo con comprobaciones automáticas mediante </text:span><text:span text:style-name="Source_20_Text"><text:span text:style-name="T21">assert</text:span></text:span><text:span text:style-name="T21"> ha permitido confirmar la correcta inicialización del sistema tras el reset, la convergencia de la media y la estabilidad del estado interno ante el control de carga (</text:span><text:span text:style-name="Source_20_Text"><text:span text:style-name="T21">load</text:span></text:span><text:span text:style-name="T21">).</text:span></text:p>
        </text:list-item>
      </text:list>
      <text:p text:style-name="P44"><text:bookmark text:name="p-rc_f00ee8762033e9f3-591"/>En definitiva, la práctica ha servido para asentar los conceptos fundamentales de diseño digital <text:span text:style-name="T17">y buenas prácticas en VHDL orientado al diseño automático de sistemas fiables</text:span>.</text:p>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color="#000000" loext:opacity="1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color="#579d1c" loext:opacity="100%"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Inline_20_Heading" style:display-name="Inline Heading" style:family="graphic">
      <style:graphic-properties fo:min-width="0cm" fo:min-height="0cm"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s" fo:country="ES" officeooo:rsid="000da839" officeooo:paragraph-rsid="000da839" style:script-type="latin"/>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text:bookmark-start text:name="__RefHeading___Toc4_716519090"/>Diseño automático de sistemas fiables. Práctica 4: Filtro SMA de orden 4<text:bookmark-end text:name="__RefHeading___Toc4_716519090"/></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6T19:18:38.031476700</meta:creation-date>
    <dc:date>2026-04-26T21:37:36.613598483</dc:date>
    <meta:editing-duration>PT25M11S</meta:editing-duration>
    <meta:editing-cycles>5</meta:editing-cycles>
    <meta:generator>LibreOffice/26.2.2.2$Linux_X86_64 LibreOffice_project/620$Build-2</meta:generator>
    <meta:print-date>2026-04-26T21:34:38.535277867</meta:print-date>
    <meta:printed-by>PDF files</meta:printed-by>
    <meta:document-statistic meta:table-count="0" meta:image-count="6" meta:object-count="0" meta:page-count="8" meta:paragraph-count="85" meta:word-count="1418" meta:character-count="8353" meta:non-whitespace-character-count="7012"/>
  </office:meta>
</office:document-meta>
</file>